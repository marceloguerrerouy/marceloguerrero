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T1" style:family="text">
      <style:text-properties officeooo:rsid="000e443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H</text:span>acemos una carpeta <text:span text:style-name="Strong_20_Emphasis">herramientas</text:span> aún más profesional. Podemos agregar algunos scripts muy útiles para el futuro, por ejemplo:</text:p>
      <text:list text:style-name="L1">
        <text:list-item>
          <text:p text:style-name="P1">📦 <text:span text:style-name="Source_20_Text">backup-proyecto.py</text:span> (hace una copia de seguridad completa del sitio). </text:p>
        </text:list-item>
        <text:list-item>
          <text:p text:style-name="P1">🖼️ <text:span text:style-name="Source_20_Text">optimizar-imagenes.py</text:span> (optimiza automáticamente nuevas imágenes). </text:p>
        </text:list-item>
        <text:list-item>
          <text:p text:style-name="P1">🔍 <text:span text:style-name="Source_20_Text">buscar-enlaces-rotos.py</text:span> (detecta imágenes o archivos faltantes). </text:p>
        </text:list-item>
        <text:list-item>
          <text:p text:style-name="P2">📊 <text:span text:style-name="Source_20_Text">estadisticas-proyecto.py</text:span> (muestra cantidad de imágenes, tamaño del sitio, etc.). </text:p>
        </text:list-item>
      </text:list>
      <text:p text:style-name="Text_20_body">Con eso tendrás un verdadero <text:span text:style-name="Strong_20_Emphasis">kit de mantenimiento</text:span> para tu página web, algo que incluso muchos desarrolladores no tienen prepara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2T17:10:53.969694600</meta:creation-date>
    <dc:date>2026-07-02T17:11:48.782538600</dc:date>
    <meta:editing-duration>PT55S</meta:editing-duration>
    <meta:editing-cycles>1</meta:editing-cycles>
    <meta:document-statistic meta:table-count="0" meta:image-count="0" meta:object-count="0" meta:page-count="1" meta:paragraph-count="6" meta:word-count="75" meta:character-count="548" meta:non-whitespace-character-count="479"/>
    <meta:generator>LibreOffice/26.2.4.2$Windows_X86_64 LibreOffice_project/0229ac93fcf0d7cbc6376066c6f35021cef002dc</meta:generator>
  </office:meta>
</office:document-meta>
</file>