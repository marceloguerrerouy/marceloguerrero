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vertir-a-webp.py</text:p>
      <text:p text:style-name="Standard">Convierte todas las imágenes PNG a WebP.</text:p>
      <text:p text:style-name="Standard"/>
      <text:p text:style-name="Standard">actualizar-enlaces-webp.py</text:p>
      <text:p text:style-name="Standard">Actualiza automáticamente HTML, CSS y JS para usar .webp.</text:p>
      <text:p text:style-name="Standard"/>
      <text:p text:style-name="Standard">revisar-imagenes.py</text:p>
      <text:p text:style-name="Standard">Comprueba que todas las imágenes referenciadas existan.</text:p>
      <text:p text:style-name="Standard"/>
      <text:p text:style-name="Standard">revisar-png-pendientes.py</text:p>
      <text:p text:style-name="Standard">Verifica que no queden referencias a .png.</text:p>
      <text:p text:style-name="Standard"/>
      <text:p text:style-name="Standard">inventario-proyecto.py</text:p>
      <text:p text:style-name="Standard">Genera un resumen del proyec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2T17:08:07.751543700</meta:creation-date>
    <dc:date>2026-07-02T17:09:22.511835500</dc:date>
    <meta:editing-duration>PT1M15S</meta:editing-duration>
    <meta:editing-cycles>1</meta:editing-cycles>
    <meta:document-statistic meta:table-count="0" meta:image-count="0" meta:object-count="0" meta:page-count="1" meta:paragraph-count="10" meta:word-count="40" meta:character-count="336" meta:non-whitespace-character-count="306"/>
    <meta:generator>LibreOffice/26.2.4.2$Windows_X86_64 LibreOffice_project/0229ac93fcf0d7cbc6376066c6f35021cef002dc</meta:generator>
  </office:meta>
</office:document-meta>
</file>